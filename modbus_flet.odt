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60000030B7D54E4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188cm" table:align="left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.496cm"/>
    </style:style>
    <style:style style:name="Tabela1.C" style:family="table-column">
      <style:table-column-properties style:column-width="3.69cm"/>
    </style:style>
    <style:style style:name="Tabela1.D" style:family="table-column">
      <style:table-column-properties style:column-width="3.004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Preformatted_20_Text">
      <style:text-properties officeooo:rsid="000a6a52" officeooo:paragraph-rsid="000a6a52"/>
    </style:style>
    <style:style style:name="P2" style:family="paragraph" style:parent-style-name="Preformatted_20_Text">
      <style:paragraph-properties fo:break-before="page"/>
    </style:style>
    <style:style style:name="P3" style:family="paragraph" style:parent-style-name="Heading_20_3">
      <style:paragraph-properties fo:break-before="page"/>
      <style:text-properties style:font-name="Google Sans" fo:font-size="10pt" style:font-name-asian="Noto Sans Mono CJK SC" style:font-size-asian="10pt" style:font-name-complex="Liberation Mono" style:font-size-complex="10pt"/>
    </style:style>
    <style:style style:name="P4" style:family="paragraph" style:parent-style-name="Heading_20_3">
      <style:text-properties style:font-name="Google Sans" fo:font-size="10pt" style:font-name-asian="Noto Sans Mono CJK SC" style:font-size-asian="10pt" style:font-name-complex="Liberation Mono" style:font-size-complex="10pt"/>
    </style:style>
    <style:style style:name="P5" style:family="paragraph" style:parent-style-name="Text_20_body">
      <style:text-properties style:font-name="Google Sans" fo:font-size="10pt" style:font-name-asian="Noto Sans Mono CJK SC" style:font-size-asian="10pt" style:font-name-complex="Liberation Mono" style:font-size-complex="10pt"/>
    </style:style>
    <style:style style:name="P6" style:family="paragraph" style:parent-style-name="Text_20_body" style:list-style-name="L1">
      <style:text-properties style:font-name="Google Sans" fo:font-size="10pt" fo:font-weight="bold" style:font-name-asian="Noto Sans Mono CJK SC" style:font-size-asian="10pt" style:font-name-complex="Liberation Mono" style:font-size-complex="10pt"/>
    </style:style>
    <style:style style:name="P7" style:family="paragraph" style:parent-style-name="Text_20_body" style:list-style-name="L1">
      <style:text-properties style:font-name="Google Sans" fo:font-size="10pt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mport asyncio</text:p>
      <text:p text:style-name="Preformatted_20_Text">from telemetrix import telemetrix</text:p>
      <text:p text:style-name="Preformatted_20_Text">from pyModbusTCP.server import ModbusServer</text:p>
      <text:p text:style-name="Preformatted_20_Text">import flet as ft</text:p>
      <text:p text:style-name="Preformatted_20_Text"/>
      <text:p text:style-name="Preformatted_20_Text"># ================= MODBUS =================</text:p>
      <text:p text:style-name="Preformatted_20_Text">server = ModbusServer(host="0.0.0.0", port=5020, no_block=True)</text:p>
      <text:p text:style-name="Preformatted_20_Text"/>
      <text:p text:style-name="Preformatted_20_Text"># ================= ARDUINO =================</text:p>
      <text:p text:style-name="Preformatted_20_Text">board = telemetrix.Telemetrix()</text:p>
      <text:p text:style-name="Preformatted_20_Text"/>
      <text:p text:style-name="Preformatted_20_Text">pino_analogico = 0</text:p>
      <text:p text:style-name="Preformatted_20_Text">valor_sensor = 0</text:p>
      <text:p text:style-name="Preformatted_20_Text"/>
      <text:p text:style-name="Preformatted_20_Text">def callback_analogico(data):</text:p>
      <text:p text:style-name="Preformatted_20_Text"><text:s text:c="4"/>global valor_sensor</text:p>
      <text:p text:style-name="Preformatted_20_Text"><text:s text:c="4"/>valor_sensor = data[2]</text:p>
      <text:p text:style-name="Preformatted_20_Text"/>
      <text:p text:style-name="Preformatted_20_Text">board.set_pin_mode_analog_input(pino_analogico, callback=callback_analogico)</text:p>
      <text:p text:style-name="Preformatted_20_Text"/>
      <text:p text:style-name="Preformatted_20_Text"># ================= APP =================</text:p>
      <text:p text:style-name="Preformatted_20_Text">async def main(page: ft.Page):</text:p>
      <text:p text:style-name="Preformatted_20_Text"><text:s text:c="4"/>global valor_sensor</text:p>
      <text:p text:style-name="Preformatted_20_Text"/>
      <text:p text:style-name="Preformatted_20_Text"><text:s text:c="4"/>page.title = "Servidor de modbus – Arduino + Flet"</text:p>
      <text:p text:style-name="Preformatted_20_Text"><text:s text:c="4"/>page.theme_mode = ft.ThemeMode.DARK</text:p>
      <text:p text:style-name="Preformatted_20_Text"><text:s text:c="4"/>page.horizontal_alignment = ft.CrossAxisAlignment.CENTER</text:p>
      <text:p text:style-name="Preformatted_20_Text"/>
      <text:p text:style-name="Preformatted_20_Text"><text:s text:c="4"/>ldr_text = ft.Text("Luminosidade: -- V", size=20)</text:p>
      <text:p text:style-name="Preformatted_20_Text"/>
      <text:p text:style-name="Preformatted_20_Text"><text:s text:c="4"/># botão de saída</text:p>
      <text:p text:style-name="Preformatted_20_Text"><text:s text:c="4"/>async def on_exit(e):</text:p>
      <text:p text:style-name="Preformatted_20_Text"><text:s text:c="8"/>board.shutdown()</text:p>
      <text:p text:style-name="Preformatted_20_Text"><text:s text:c="8"/>server.stop()</text:p>
      <text:p text:style-name="Preformatted_20_Text"><text:s text:c="8"/>await page.window.destroy()</text:p>
      <text:p text:style-name="Preformatted_20_Text"/>
      <text:p text:style-name="Preformatted_20_Text"><text:s text:c="4"/>page.add(</text:p>
      <text:p text:style-name="Preformatted_20_Text"><text:s text:c="8"/>ft.Column(</text:p>
      <text:p text:style-name="Preformatted_20_Text"><text:s text:c="12"/>[</text:p>
      <text:p text:style-name="Preformatted_20_Text"><text:s text:c="16"/>ldr_text,</text:p>
      <text:p text:style-name="Preformatted_20_Text"><text:s text:c="16"/>ft.ElevatedButton("Sair", on_click=on_exit)</text:p>
      <text:p text:style-name="Preformatted_20_Text"><text:s text:c="12"/>],</text:p>
      <text:p text:style-name="Preformatted_20_Text"><text:s text:c="12"/>horizontal_alignment=ft.CrossAxisAlignment.CENTER</text:p>
      <text:p text:style-name="Preformatted_20_Text"><text:s text:c="8"/>)</text:p>
      <text:p text:style-name="Preformatted_20_Text"><text:s text:c="4"/>)</text:p>
      <text:p text:style-name="Preformatted_20_Text"/>
      <text:p text:style-name="Preformatted_20_Text"><text:s text:c="4"/>server.start()</text:p>
      <text:p text:style-name="Preformatted_20_Text"/>
      <text:p text:style-name="Preformatted_20_Text"><text:s text:c="4"/>async def update_loop():</text:p>
      <text:p text:style-name="Preformatted_20_Text"><text:s text:c="8"/>while True:</text:p>
      <text:p text:style-name="Preformatted_20_Text"><text:s text:c="12"/>server.data_bank.set_holding_registers(0, [valor_sensor])</text:p>
      <text:p text:style-name="Preformatted_20_Text"/>
      <text:p text:style-name="Preformatted_20_Text"><text:s text:c="12"/>ldr_v = valor_sensor * 5 / 1023</text:p>
      <text:p text:style-name="Preformatted_20_Text"><text:s text:c="12"/>ldr_text.value = f"Luminosidade: {ldr_v:.2f} V"</text:p>
      <text:p text:style-name="Preformatted_20_Text"/>
      <text:p text:style-name="Preformatted_20_Text"><text:s text:c="12"/>page.update()</text:p>
      <text:p text:style-name="Preformatted_20_Text"><text:s text:c="12"/>await asyncio.sleep(0.1)</text:p>
      <text:p text:style-name="Preformatted_20_Text"/>
      <text:p text:style-name="Preformatted_20_Text"><text:s text:c="4"/>asyncio.create_task(update_loop())</text:p>
      <text:p text:style-name="Preformatted_20_Text"/>
      <text:p text:style-name="Preformatted_20_Text"/>
      <text:p text:style-name="Preformatted_20_Text"># ================= RUN =================</text:p>
      <text:p text:style-name="Preformatted_20_Text">ft.app(target=main)</text:p>
      <text:p text:style-name="Preformatted_20_Text"/>
      <text:p text:style-name="Preformatted_20_Text"><text:soft-page-break/></text:p>
      <text:p text:style-name="P1">configuração de data sources no scada-LTS:</text:p>
      <text:p text:style-name="P1"/>
      <text:p text:style-name="Preformatted_20_Text"/>
      <text:p text:style-name="P2"/>
      <text:p text:style-name="Preformatted_20_Text"><draw:frame draw:style-name="fr1" draw:name="Imagem1" text:anchor-type="char" svg:x="0cm" svg:y="0.03cm" svg:width="17cm" svg:height="13.27cm" draw:z-index="0"><draw:image xlink:href="Pictures/10000001000003E60000030B7D54E4F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h text:style-name="P3" text:outline-level="3"/>
      <text:h text:style-name="P4" text:outline-level="3">1. Configuração dos Pontos (No Scada-LTS)</text:h>
      <text:p text:style-name="P5">Vimos na imagem anterior que alguns pontos estavam configurados como "Status de entrada" ou "Binário". Para o DHT funcionar, eles <text:span text:style-name="T1">têm</text:span> de estar assim:</text:p>
      <text:list text:style-name="L1">
        <text:list-item>
          <text:p text:style-name="P6">DHT_temperatura:</text:p>
          <text:list>
            <text:list-item>
              <text:p text:style-name="P7"><text:span text:style-name="T1">Faixa do registro:</text:span> <text:span text:style-name="Source_20_Text">Registrador holding</text:span></text:p>
            </text:list-item>
            <text:list-item>
              <text:p text:style-name="P7"><text:span text:style-name="T1">Offset:</text:span> <text:span text:style-name="Source_20_Text">3</text:span></text:p>
            </text:list-item>
            <text:list-item>
              <text:p text:style-name="P7"><text:span text:style-name="T1">Tipo de dados modbus:</text:span> <text:span text:style-name="Source_20_Text">Inteiro de 2 bytes sem sinal</text:span></text:p>
            </text:list-item>
          </text:list>
        </text:list-item>
        <text:list-item>
          <text:p text:style-name="P6">DHT_Humidade:</text:p>
          <text:list>
            <text:list-item>
              <text:p text:style-name="P7"><text:span text:style-name="T1">Faixa do registro:</text:span> <text:span text:style-name="Source_20_Text">Registrador holding</text:span></text:p>
            </text:list-item>
            <text:list-item>
              <text:p text:style-name="P7"><text:span text:style-name="T1">Offset:</text:span> <text:span text:style-name="Source_20_Text">4</text:span></text:p>
            </text:list-item>
            <text:list-item>
              <text:p text:style-name="P7"><text:span text:style-name="T1">Tipo de dados modbus:</text:span> <text:span text:style-name="Source_20_Text">Inteiro de 2 bytes sem sinal</text:span></text:p>
            </text:list-item>
          </text:list>
        </text:list-item>
      </text:list>
      <text:p text:style-name="P5"/>
      <text:h text:style-name="P4" text:outline-level="3"/>
      <text:h text:style-name="P4" text:outline-level="3"/>
      <text:h text:style-name="P4" text:outline-level="3">Mapa Atualizado de Registradores (Offsets)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8"><text:span text:style-name="Strong_20_Emphasis"><text:span text:style-name="T2">Componente</text:span></text:span></text:p>
            </table:table-cell>
            <table:table-cell table:style-name="Tabela1.A1" office:value-type="string">
              <text:p text:style-name="P8"><text:span text:style-name="Strong_20_Emphasis"><text:span text:style-name="T2">Offset</text:span></text:span></text:p>
            </table:table-cell>
            <table:table-cell table:style-name="Tabela1.A1" office:value-type="string">
              <text:p text:style-name="P8"><text:span text:style-name="Strong_20_Emphasis"><text:span text:style-name="T2">Direção</text:span></text:span></text:p>
            </table:table-cell>
            <table:table-cell table:style-name="Tabela1.A1" office:value-type="string">
              <text:p text:style-name="P8"><text:span text:style-name="Strong_20_Emphasis"><text:span text:style-name="T2">Tipo de Dado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9">LDR</text:p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Arduino → Scada</text:p>
          </table:table-cell>
          <table:table-cell table:style-name="Tabela1.A1" office:value-type="string">
            <text:p text:style-name="P10">0-1023</text:p>
          </table:table-cell>
        </table:table-row>
        <table:table-row>
          <table:table-cell table:style-name="Tabela1.A1" office:value-type="string">
            <text:p text:style-name="P9">Relé</text:p>
          </table:table-cell>
          <table:table-cell table:style-name="Tabela1.A1" office:value-type="string">
            <text:p text:style-name="P10">1</text:p>
          </table:table-cell>
          <table:table-cell table:style-name="Tabela1.A1" office:value-type="string">
            <text:p text:style-name="P9">Scada → Arduino</text:p>
          </table:table-cell>
          <table:table-cell table:style-name="Tabela1.A1" office:value-type="string">
            <text:p text:style-name="P10">0 ou 1</text:p>
          </table:table-cell>
        </table:table-row>
        <table:table-row>
          <table:table-cell table:style-name="Tabela1.A1" office:value-type="string">
            <text:p text:style-name="P9">Servo</text:p>
          </table:table-cell>
          <table:table-cell table:style-name="Tabela1.A1" office:value-type="string">
            <text:p text:style-name="P10">2</text:p>
          </table:table-cell>
          <table:table-cell table:style-name="Tabela1.A1" office:value-type="string">
            <text:p text:style-name="P9">Scada → Arduino</text:p>
          </table:table-cell>
          <table:table-cell table:style-name="Tabela1.A1" office:value-type="string">
            <text:p text:style-name="P10">0-180</text:p>
          </table:table-cell>
        </table:table-row>
        <table:table-row>
          <table:table-cell table:style-name="Tabela1.A1" office:value-type="string">
            <text:p text:style-name="P9">Temperatura</text:p>
          </table:table-cell>
          <table:table-cell table:style-name="Tabela1.A1" office:value-type="string">
            <text:p text:style-name="P10">3</text:p>
          </table:table-cell>
          <table:table-cell table:style-name="Tabela1.A1" office:value-type="string">
            <text:p text:style-name="P10">Arduino → Scada</text:p>
          </table:table-cell>
          <table:table-cell table:style-name="Tabela1.A1" office:value-type="string">
            <text:p text:style-name="P10">°C</text:p>
          </table:table-cell>
        </table:table-row>
        <table:table-row>
          <table:table-cell table:style-name="Tabela1.A1" office:value-type="string">
            <text:p text:style-name="P9">Humidade</text:p>
          </table:table-cell>
          <table:table-cell table:style-name="Tabela1.A1" office:value-type="string">
            <text:p text:style-name="P10">4</text:p>
          </table:table-cell>
          <table:table-cell table:style-name="Tabela1.A1" office:value-type="string">
            <text:p text:style-name="P10">Arduino → Scada</text:p>
          </table:table-cell>
          <table:table-cell table:style-name="Tabela1.A1" office:value-type="string">
            <text:p text:style-name="P10">%</text:p>
          </table:table-cell>
        </table:table-row>
        <table:table-row>
          <table:table-cell table:style-name="Tabela1.A1" office:value-type="string">
            <text:p text:style-name="P9">Ultrassom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10">Arduino → Scada</text:p>
          </table:table-cell>
          <table:table-cell table:style-name="Tabela1.A1" office:value-type="string">
            <text:p text:style-name="P10">cm</text:p>
          </table:table-cell>
        </table:table-row>
        <table:table-row>
          <table:table-cell table:style-name="Tabela1.A1" office:value-type="string">
            <text:p text:style-name="P9">PIR</text:p>
          </table:table-cell>
          <table:table-cell table:style-name="Tabela1.A1" office:value-type="string">
            <text:p text:style-name="P10">6</text:p>
          </table:table-cell>
          <table:table-cell table:style-name="Tabela1.A1" office:value-type="string">
            <text:p text:style-name="P10">Arduino → Scada</text:p>
          </table:table-cell>
          <table:table-cell table:style-name="Tabela1.A1" office:value-type="string">
            <text:p text:style-name="P10">0 ou 1</text:p>
          </table:table-cell>
        </table:table-row>
      </table:table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7T17:59:09.706880135</dc:date>
    <meta:editing-duration>PT17M30S</meta:editing-duration>
    <meta:editing-cycles>4</meta:editing-cycles>
    <meta:generator>LibreOffice/26.2.2.2$Linux_X86_64 LibreOffice_project/620$Build-2</meta:generator>
    <meta:document-statistic meta:table-count="1" meta:image-count="1" meta:object-count="0" meta:page-count="4" meta:paragraph-count="90" meta:word-count="262" meta:character-count="2238" meta:non-whitespace-character-count="1841"/>
  </office:meta>
</office:document-meta>
</file>